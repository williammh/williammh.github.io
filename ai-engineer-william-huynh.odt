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rlito" svg:font-family="Carlito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officeooo:rsid="0012cfa2"/>
    </style:style>
    <style:style style:name="T2" style:family="text">
      <style:text-properties officeooo:rsid="0010defb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0defb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Name">William Huynh</text:p>
      <text:p text:style-name="Contact">whuynh23@gmail.com | 206-999-3618 | linkedin.com/in/williammhuynh | williammh.github.io | Las Vegas, NV</text:p>
      <text:p text:style-name="Section">SUMMARY</text:p>
      <text:p text:style-name="Body">Senior engineer who ships production ML and LLM systems end to end — from self-hosted inference and prompt-driven behavioral control to the real-time data infrastructure that feeds them. Built a multi-tenant strategy-execution engine solo, evaluating user-defined logic against live market data at sub-50ms latency. Prior AI-backed products at Microsoft and enterprise SaaS at Fortune-100 scale at Smartsheet.</text:p>
      <text:p text:style-name="Section">TECHNICAL SKILLS</text:p>
      <text:p text:style-name="Body"><text:span text:style-name="Bold">ML / AI: </text:span>LLM integration &amp; deployment, self-hosted inference (Ollama, LLaMA), prompt engineering for behavioral control, agentic workflows, NumPy, Pandas, Matplotlib</text:p>
      <text:p text:style-name="Body"><text:span text:style-name="Bold">Languages: </text:span>Python, TypeScript, JavaScript (ES6+), C#, SQL</text:p>
      <text:p text:style-name="Body"><text:span text:style-name="Bold">Backend / Data: </text:span>FastAPI, asyncio, Node.js, PostgreSQL, Redis, ETL &amp; real-time streaming pipelines, WebSockets, lock-free IPC</text:p>
      <text:p text:style-name="Body"><text:span text:style-name="Bold">Cloud / Infra: </text:span>AWS, Azure, GCP, Oracle Cloud (OCI ARM64), Cloudflare, Vercel, Thunder Compute, Docker</text:p>
      <text:p text:style-name="Body"><text:span text:style-name="Bold">Frontend: </text:span>React, Next.js, TypeScript, TailwindCSS, Shadcn</text:p>
      <text:p text:style-name="Body"><text:span text:style-name="Bold">Tools: </text:span>Cursor, GitHub Copilot, Claude Code, Playwright, Vitest, Git</text:p>
      <text:p text:style-name="Section">EXPERIENCE</text:p>
      <text:p text:style-name="RoleHead"><text:span text:style-name="Bold"><text:span text:style-name="T1">Founding</text:span></text:span><text:span text:style-name="Bold"> Engineer — LiveTape.ai</text:span> — <text:span text:style-name="Ital">Remote | 09/2023 – Present</text:span></text:p>
      <text:list text:style-name="L1">
        <text:list-item>
          <text:p text:style-name="Bullet">Designed and shipped a multi-tenant strategy-execution platform solo, running in production across crypto, equities, and prediction markets on Python/FastAPI and React/TypeScript.</text:p>
        </text:list-item>
        <text:list-item>
          <text:p text:style-name="Bullet">Built a self-hosted inference path (Ollama/LLaMA) and prompt-engineered agents that compose a trading-logic grammar — constraining LLM output to a schema validated identically on client and server, so generated strategies can never desync from execution.</text:p>
        </text:list-item>
        <text:list-item>
          <text:p text:style-name="Bullet">Engineered an ETL streaming pipeline evaluating a user-composed expression tree against every incoming tick at sub-50ms internal latency, versus the once-per-bar model most tools settle for.</text:p>
        </text:list-item>
        <text:list-item>
          <text:p text:style-name="Bullet">Architected a lock-free, zero-copy IPC layer (seqlock over a memory-mapped ring buffer) between ingestion and evaluation — readers never block writers, no mutex or message queue.</text:p>
        </text:list-item>
        <text:list-item>
          <text:p text:style-name="Bullet">Ran up to 50 concurrent tenant strategies in one asyncio loop with isolated per-runtime state and no DB access on the hot path.</text:p>
        </text:list-item>
      </text:list>
      <text:p text:style-name="RoleHead"><text:span text:style-name="Bold">Software Engineer II — Smartsheet</text:span> — <text:span text:style-name="Ital">Remote | 06/2021 – 09/2023</text:span></text:p>
      <text:list text:style-name="L1">
        <text:list-item>
          <text:p text:style-name="Bullet">Built and maintained core features for Smartsheet Control Center, an enterprise product used by 96 of the Fortune 100, on React, TypeScript, Node.js, and Ruby.</text:p>
        </text:list-item>
        <text:list-item>
          <text:p text:style-name="Bullet">Contributed reusable components to the Lodestar design system, cutting UI dev time ~20% across teams; led the i18n initiative supporting 3M+ users globally.</text:p>
        </text:list-item>
      </text:list>
      <text:p text:style-name="RoleHead"><text:span text:style-name="Bold"><text:span text:style-name="T2">S</text:span></text:span><text:span text:style-name="Bold">oftware Engineer </text:span><text:span text:style-name="Bold"><text:span text:style-name="T3">/ </text:span></text:span><text:span text:style-name="Bold"><text:span text:style-name="T4">Technical Lead</text:span></text:span><text:span text:style-name="Bold"> — Microsoft</text:span> (via Mindtree / Insight Global) — <text:span text:style-name="Ital">Remote | 01/2020 – 05/2021</text:span></text:p>
      <text:list text:style-name="L1">
        <text:list-item>
          <text:p text:style-name="Bullet">Built Power Platform products including AI Builder, exposing complex ML-backed business logic through scalable APIs for external consumption.</text:p>
        </text:list-item>
        <text:list-item>
          <text:p text:style-name="Bullet">Owned frontend architecture modernization and a TypeScript lint migration adopted across multiple engineering teams; achieved WCAG 2.1 compliance for critical admin workflows.</text:p>
        </text:list-item>
      </text:list>
      <text:p text:style-name="Section">EDUCATION &amp; CERTIFICATIONS</text:p>
      <text:p text:style-name="Body"><text:span text:style-name="Bold">B.S., Public Policy</text:span>, University of Arizona · Azure Fundamentals (AZ-900) · AWS ML Engineer (in progress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rlito" svg:font-family="Carlito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Carlito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Carlito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28in" style:contextual-spacing="false" fo:line-height="104%"/>
      <style:text-properties style:font-name="Carlito" fo:font-family="Carlito" fo:font-size="10pt"/>
    </style:style>
    <style:style style:name="Name" style:family="paragraph" style:parent-style-name="Standard">
      <style:paragraph-properties fo:margin-top="0in" fo:margin-bottom="0.0138in" style:contextual-spacing="false"/>
      <style:text-properties fo:font-size="19pt" fo:font-weight="bold"/>
    </style:style>
    <style:style style:name="Contact" style:family="paragraph" style:parent-style-name="Standard">
      <style:paragraph-properties fo:margin-top="0in" fo:margin-bottom="0.0835in" style:contextual-spacing="false"/>
      <style:text-properties fo:font-size="9.5pt"/>
    </style:style>
    <style:style style:name="Section" style:family="paragraph" style:parent-style-name="Standard">
      <style:paragraph-properties fo:margin-top="0.0693in" fo:margin-bottom="0.028in" style:contextual-spacing="false" fo:padding-left="0in" fo:padding-right="0in" fo:padding-top="0in" fo:padding-bottom="0.0138in" fo:border-left="none" fo:border-right="none" fo:border-top="none" fo:border-bottom="0.51pt solid #000000"/>
      <style:text-properties fo:font-size="11pt" fo:letter-spacing="0.0071in" fo:font-weight="bold"/>
    </style:style>
    <style:style style:name="RoleHead" style:family="paragraph" style:parent-style-name="Standard">
      <style:paragraph-properties fo:margin-top="0.0484in" fo:margin-bottom="0.0138in" style:contextual-spacing="false"/>
    </style:style>
    <style:style style:name="Body" style:family="paragraph" style:parent-style-name="Standard">
      <style:paragraph-properties fo:margin-top="0in" fo:margin-bottom="0.028in" style:contextual-spacing="false"/>
    </style:style>
    <style:style style:name="Bullet" style:family="paragraph" style:parent-style-name="Standard" style:list-style-name="L1">
      <style:paragraph-properties fo:margin-left="0.2201in" fo:margin-top="0in" fo:margin-bottom="0.0071in" style:contextual-spacing="false" fo:text-indent="-0.15in" style:auto-text-indent="false"/>
    </style:style>
    <style:style style:name="Bold" style:family="text">
      <style:text-properties fo:font-weight="bold"/>
    </style:style>
    <style:style style:name="Ital" style:family="text">
      <style:text-properties fo:font-style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1">
      <text:list-level-style-bullet text:level="1" loext:num-list-format="%1%" text:bullet-char="•">
        <style:list-level-properties text:min-label-width="0.15i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45in" fo:margin-bottom="0.4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date>2026-07-15T12:04:05.349799762</dc:date>
    <meta:editing-duration>PT25S</meta:editing-duration>
    <meta:editing-cycles>2</meta:editing-cycles>
    <meta:document-statistic meta:table-count="0" meta:image-count="0" meta:object-count="0" meta:page-count="1" meta:paragraph-count="26" meta:word-count="422" meta:character-count="3056" meta:non-whitespace-character-count="2657"/>
  </office:meta>
</office:document-meta>
</file>