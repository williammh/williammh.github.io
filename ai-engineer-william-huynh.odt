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officeooo:rsid="0010def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def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Body">Senior engineer who ships production ML and LLM systems end to end — from self-hosted inference and prompt-driven behavioral control to the real-time data infrastructure that feeds them. Built a multi-tenant strategy-execution engine solo, evaluating user-defined logic against live market data at sub-50ms latency. Prior AI-backed products at Microsoft and enterprise SaaS at Fortune-100 scale at Smartsheet.</text:p>
      <text:p text:style-name="Section">TECHNICAL SKILLS</text:p>
      <text:p text:style-name="Body"><text:span text:style-name="Bold">ML / AI: </text:span>LLM integration &amp; deployment, self-hosted inference (Ollama, LLaMA), prompt engineering for behavioral control, agentic workflows, NumPy, Pandas, Matplotlib</text:p>
      <text:p text:style-name="Body"><text:span text:style-name="Bold">Languages: </text:span>Python, TypeScript, JavaScript (ES6+), C#, SQL</text:p>
      <text:p text:style-name="Body"><text:span text:style-name="Bold">Backend / Data: </text:span>FastAPI, asyncio, Node.js, PostgreSQL, Redis, ETL &amp; real-time streaming pipelines, WebSockets, lock-free IPC</text:p>
      <text:p text:style-name="Body"><text:span text:style-name="Bold">Cloud / Infra: </text:span>AWS, Azure, GCP, Oracle Cloud (OCI ARM64), Cloudflare, Vercel, Thunder Compute, Docker</text:p>
      <text:p text:style-name="Body"><text:span text:style-name="Bold">Frontend: </text:span>React, Next.js, TypeScript, TailwindCSS, Shadcn</text:p>
      <text:p text:style-name="Body"><text:span text:style-name="Bold">Tools: </text:span>Cursor, GitHub Copilot, Claude Code, Playwright, Vitest, Git</text:p>
      <text:p text:style-name="Section">EXPERIENCE</text:p>
      <text:p text:style-name="RoleHead"><text:span text:style-name="Bold">Founding Engineer — LiveTape.ai</text:span> (Independent) — <text:span text:style-name="Ital">Remote | 09/2023 – Present</text:span></text:p>
      <text:list text:style-name="L1">
        <text:list-item>
          <text:p text:style-name="Bullet">Designed and shipped a multi-tenant strategy-execution platform solo, running in production across crypto, equities, and prediction markets on Python/FastAPI and React/TypeScript.</text:p>
        </text:list-item>
        <text:list-item>
          <text:p text:style-name="Bullet">Built a self-hosted inference path (Ollama/LLaMA) and prompt-engineered agents that compose a trading-logic grammar — constraining LLM output to a schema validated identically on client and server, so generated strategies can never desync from execution.</text:p>
        </text:list-item>
        <text:list-item>
          <text:p text:style-name="Bullet">Engineered an ETL streaming pipeline evaluating a user-composed expression tree against every incoming tick at sub-50ms internal latency, versus the once-per-bar model most tools settle for.</text:p>
        </text:list-item>
        <text:list-item>
          <text:p text:style-name="Bullet">Architected a lock-free, zero-copy IPC layer (seqlock over a memory-mapped ring buffer) between ingestion and evaluation — readers never block writers, no mutex or message queue.</text:p>
        </text:list-item>
        <text:list-item>
          <text:p text:style-name="Bullet">Ran up to 50 concurrent tenant strategies in one asyncio loop with isolated per-runtime state and no DB access on the hot path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reusable components to the Lodestar design system, cutting UI dev time ~20% across teams; led the i18n initiative supporting 3M+ users globally.</text:p>
        </text:list-item>
      </text:list>
      <text:p text:style-name="RoleHead"><text:span text:style-name="Bold"><text:span text:style-name="T1">S</text:span></text:span><text:span text:style-name="Bold">oftware Engineer </text:span><text:span text:style-name="Bold"><text:span text:style-name="T2">/ </text:span></text:span><text:span text:style-name="Bold"><text:span text:style-name="T3">Technical Lead</text:span></text:span><text:span text:style-name="Bold">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AI Builder, exposing complex ML-backed business logic through scalable APIs for external consumption.</text:p>
        </text:list-item>
        <text:list-item>
          <text:p text:style-name="Bullet">Owned frontend architecture modernization and a TypeScript lint migration adopted across multiple engineering teams; achieved WCAG 2.1 compliance for critical admin workflows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 · AWS ML Engineer (in progres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0pt" fo:language="en" fo:country="US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835in" style:contextual-spacing="false"/>
      <style:text-properties fo:font-size="9.5pt"/>
    </style:style>
    <style:style style:name="Section" style:family="paragraph" style:parent-style-name="Standard">
      <style:paragraph-properties fo:margin-top="0.0693in" fo:margin-bottom="0.028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484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3T13:20:32.760721135</dc:date>
    <meta:editing-duration>PT12S</meta:editing-duration>
    <meta:editing-cycles>1</meta:editing-cycles>
    <meta:document-statistic meta:table-count="0" meta:image-count="0" meta:object-count="0" meta:page-count="1" meta:paragraph-count="26" meta:word-count="423" meta:character-count="3070" meta:non-whitespace-character-count="2670"/>
  </office:meta>
</office:document-meta>
</file>