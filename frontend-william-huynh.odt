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ody">
      <style:text-properties officeooo:paragraph-rsid="001b475d"/>
    </style:style>
    <style:style style:name="P2" style:family="paragraph" style:parent-style-name="Body">
      <style:paragraph-properties fo:line-height="100%" fo:text-align="start" style:justify-single-word="false" style:writing-mode="lr-tb"/>
      <style:text-properties style:font-name="Carlito"/>
    </style:style>
    <style:style style:name="P3" style:family="paragraph" style:parent-style-name="Bullet">
      <style:text-properties officeooo:paragraph-rsid="0022b7a4"/>
    </style:style>
    <style:style style:name="T1" style:family="text">
      <style:text-properties officeooo:rsid="0021a032"/>
    </style:style>
    <style:style style:name="T2" style:family="text">
      <style:text-properties officeooo:rsid="0029ad08"/>
    </style:style>
    <style:style style:name="T3" style:family="text">
      <style:text-properties officeooo:rsid="001b475d"/>
    </style:style>
    <style:style style:name="T4" style:family="text">
      <style:text-properties officeooo:rsid="0019c44b"/>
    </style:style>
    <style:style style:name="T5" style:family="text">
      <style:text-properties style:font-name="Carlito"/>
    </style:style>
    <style:style style:name="T6" style:family="text">
      <style:text-properties officeooo:rsid="00229d99"/>
    </style:style>
    <style:style style:name="T7" style:family="text">
      <style:text-properties officeooo:rsid="00260c9f"/>
    </style:style>
    <style:style style:name="T8" style:family="text">
      <style:text-properties officeooo:rsid="0026ffb0"/>
    </style:style>
    <style:style style:name="T9" style:family="text">
      <style:text-properties officeooo:rsid="002c3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frontend engineer who ships AI-powered products at scale — React/TypeScript, design systems, accessibility, and UI performance. Shipped the frontends of enterprise products used by 96 of the Fortune 100 and 3M+ users worldwide, and contributed to design systems at Smartsheet and Microsoft. Full-stack range: also builds the backends and real-time data layers those frontends run on.</text:p>
      <text:p text:style-name="Section">TECHNICAL SKILLS</text:p>
      <text:p text:style-name="Body"><text:span text:style-name="Bold">Core: </text:span>React, TypeScript, JavaScript (ES6+), Redux, MobX, Next.js</text:p>
      <text:p text:style-name="Body"><text:span text:style-name="Bold">Styling / Design Systems: </text:span>TailwindCSS, Shadcn, Material UI, Fluent UI, SASS, CSS-in-JS, Storybook, WCAG 2.1 </text:p>
      <text:p text:style-name="Body"><text:span text:style-name="Bold">Testing: </text:span>Jest, Vitest, Playwright, Cypress, Enzyme, <text:span text:style-name="T1">Pytest</text:span></text:p>
      <text:p text:style-name="Body"><text:span text:style-name="Bold">Backend / Data: </text:span>Node.js, <text:span text:style-name="T2">Python, </text:span>FastAPI, WebSockets, PostgreSQL, Redis, REST APIs</text:p>
      <text:p text:style-name="P1"><text:span text:style-name="Bold">Cloud / Tooling: </text:span><text:s/>AWS, Azure <text:span text:style-name="T3">DevOps</text:span>, Oracle Cloud (OCI ARM64), Vercel, Cloudflare <text:span text:style-name="T4">Workers</text:span>, Docker, Git</text:p>
      <text:p text:style-name="P2" loext:marker-style-name="T5"><text:span text:style-name="Bold">AI-assisted development: </text:span>Claude Code, ChatGPT Codex, GitHub Copilot, Cursor, OpenCode</text:p>
      <text:p text:style-name="Section">EXPERIENCE</text:p>
      <text:p text:style-name="RoleHead"><text:span text:style-name="Bold"><text:span text:style-name="T6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Built a real-time React/TypeScript frontend for a multi-tenant strategy-execution platform — a visual AST builder rendering trading logic composed by prompt-engineered LLM agents, one grammar validated identically on client and server.</text:p>
        </text:list-item>
        <text:list-item>
          <text:p text:style-name="Bullet">Delivered live state to the browser via WebSocket fan-out, decoupling display refresh from backend execution for smooth sub-second updates under load.</text:p>
        </text:list-item>
        <text:list-item>
          <text:p text:style-name="Bullet">Owned the full stack behind it: Python/FastAPI, PostgreSQL, Redis, deployed on OCI ARM64 behind Cloudflare.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Built a SaaS marketplace UI on Next.js and TypeScript — listings, search, filters, reviews, and role-based views.</text:p>
        </text:list-item>
      </text:list>
      <text:list text:style-name="L1">
        <text:list-item>
          <text:p text:style-name="P3">Integrated Stripe Checkout, Billing, for one-time, subscription, invoiced payments, <text:span text:style-name="T7">and </text:span><text:span text:style-name="T8">vendor</text:span> payouts.</text:p>
        </text:list-item>
        <text:list-item>
          <text:p text:style-name="P3"><text:span text:style-name="T9">I</text:span>mplemented RBAC (Buyer/Seller/Admin) and an admin console for moderation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the frontend of Smartsheet Control Center, an enterprise product used by 96 of the Fortune 100, on React, TypeScript, Redux, and Node.js.</text:p>
        </text:list-item>
        <text:list-item>
          <text:p text:style-name="Bullet">Contributed accessible, reusable components to the Lodestar design system, cutting UI development time ~20% across engineering teams — leverage other teams shipped on directly.</text:p>
        </text:list-item>
        <text:list-item>
          <text:p text:style-name="Bullet">Led the i18n initiative supporting 3M+ users globally; drove UI performance optimization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Owned frontend architecture modernization across Microsoft 365 Admin and Power Platform products, on React, TypeScript, and Redux/MobX.</text:p>
        </text:list-item>
        <text:list-item>
          <text:p text:style-name="Bullet">Built reusable components for an inner-source React design system and achieved WCAG 2.1 compliance for critical admin workflows.</text:p>
        </text:list-item>
        <text:list-item>
          <text:p text:style-name="Bullet">Owned a TypeScript lint migration adopted across multiple teams; translated Figma mockups into pixel-perfect, modular component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for a global CPQ SaaS platform (HTML, CSS, JavaScript, C#); held the #1 client satisfaction ranking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17:02.993688476</dc:date>
    <meta:editing-duration>PT10M59S</meta:editing-duration>
    <meta:editing-cycles>24</meta:editing-cycles>
    <meta:print-date>2026-07-15T12:16:48.426773207</meta:print-date>
    <meta:printed-by>PDF files</meta:printed-by>
    <meta:document-statistic meta:table-count="0" meta:image-count="0" meta:object-count="0" meta:page-count="1" meta:paragraph-count="32" meta:word-count="454" meta:character-count="3294" meta:non-whitespace-character-count="2864"/>
  </office:meta>
</office:document-meta>
</file>