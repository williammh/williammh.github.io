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style:contextual-spacing="false" fo:line-height="104%"/>
    </style:style>
    <style:style style:name="P2" style:family="paragraph" style:parent-style-name="Body">
      <style:text-properties officeooo:paragraph-rsid="000fa2be"/>
    </style:style>
    <style:style style:name="T1" style:family="text">
      <style:text-properties officeooo:rsid="0017acef"/>
    </style:style>
    <style:style style:name="T2" style:family="text">
      <style:text-properties officeooo:rsid="00146c60"/>
    </style:style>
    <style:style style:name="T3" style:family="text">
      <style:text-properties officeooo:rsid="001578ec"/>
    </style:style>
    <style:style style:name="T4" style:family="text">
      <style:text-properties officeooo:rsid="0016cc78"/>
    </style:style>
    <style:style style:name="T5" style:family="text">
      <style:text-properties officeooo:rsid="001bfa7a"/>
    </style:style>
    <style:style style:name="T6" style:family="text">
      <style:text-properties officeooo:rsid="001aa082"/>
    </style:style>
    <style:style style:name="T7" style:family="text">
      <style:text-properties officeooo:rsid="0014e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P1">Full-stack engineer who ships AI-powered products <text:span text:style-name="T1">end-to-end</text:span> — React/TypeScript interfaces through Python/Node services, real-time data, and cloud deployment. Built and run a multi-tenant strategy-execution platform in production; shipped enterprise features at Fortune-100 scale at Smartsheet and Microsoft.</text:p>
      <text:p text:style-name="Body"/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 / Data: </text:span>Node.js, FastAPI, asyncio, WebSockets, PostgreSQL, Redis, Prisma, ETL/streaming, Docker</text:p>
      <text:p text:style-name="Body"><text:span text:style-name="Bold">Cloud: </text:span>AWS, Azure, GCP, Cloudflare <text:span text:style-name="T2">Workers</text:span>, Vercel, Oracle Cloud (OCI ARM64), Digital Ocean</text:p>
      <text:p text:style-name="Body"><text:span text:style-name="Bold">Testing / Tools: </text:span>Jest, Vitest, Playwright, Cypress, Storybook, Git, Azure DevOps, Stripe, OAuth</text:p>
      <text:p text:style-name="P2"><text:span text:style-name="Bold">AI-assisted development: </text:span>Claude Code, <text:span text:style-name="T3">ChatGPT Codex, </text:span>GitHub Copilot, <text:span text:style-name="T4">Cursor,</text:span> <text:span text:style-name="T3">OpenCode</text:span></text:p>
      <text:p text:style-name="Section">EXPERIENCE</text:p>
      <text:p text:style-name="RoleHead"><text:span text:style-name="Bold"><text:span text:style-name="T5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<text:span text:style-name="T6">SaaS</text:span>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WebSocket fan-out, with display publishing throttled independently from business-logic execution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Bullet">Integrated Stripe Checkout, Billing, and Connect for payments and seller payouts; i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<text:span text:style-name="T7">Power VA and </text:span>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5T12:01:28.268244009</dc:date>
    <meta:editing-duration>PT31M40S</meta:editing-duration>
    <meta:editing-cycles>13</meta:editing-cycles>
    <meta:print-date>2026-07-15T11:50:04.468317790</meta:print-date>
    <meta:printed-by>PDF files</meta:printed-by>
    <meta:document-statistic meta:table-count="0" meta:image-count="0" meta:object-count="0" meta:page-count="1" meta:paragraph-count="30" meta:word-count="451" meta:character-count="3263" meta:non-whitespace-character-count="2833"/>
  </office:meta>
</office:document-meta>
</file>