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28in" style:contextual-spacing="false" fo:line-height="104%"/>
    </style:style>
    <style:style style:name="P2" style:family="paragraph" style:parent-style-name="Body">
      <style:text-properties officeooo:paragraph-rsid="000fa2be"/>
    </style:style>
    <style:style style:name="P3" style:family="paragraph" style:parent-style-name="Bullet">
      <style:text-properties officeooo:paragraph-rsid="001ceceb"/>
    </style:style>
    <style:style style:name="T1" style:family="text">
      <style:text-properties officeooo:rsid="0017acef"/>
    </style:style>
    <style:style style:name="T2" style:family="text">
      <style:text-properties officeooo:rsid="00146c60"/>
    </style:style>
    <style:style style:name="T3" style:family="text">
      <style:text-properties officeooo:rsid="001578ec"/>
    </style:style>
    <style:style style:name="T4" style:family="text">
      <style:text-properties officeooo:rsid="0016cc78"/>
    </style:style>
    <style:style style:name="T5" style:family="text">
      <style:text-properties officeooo:rsid="001bfa7a"/>
    </style:style>
    <style:style style:name="T6" style:family="text">
      <style:text-properties officeooo:rsid="001aa082"/>
    </style:style>
    <style:style style:name="T7" style:family="text">
      <style:text-properties officeooo:rsid="001d91f9"/>
    </style:style>
    <style:style style:name="T8" style:family="text">
      <style:text-properties officeooo:rsid="0014e0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Name">William Huynh</text:p>
      <text:p text:style-name="Contact">whuynh23@gmail.com | 206-999-3618 | linkedin.com/in/williammhuynh | williammh.github.io | Las Vegas, NV</text:p>
      <text:p text:style-name="Section">SUMMARY</text:p>
      <text:p text:style-name="P1">Full-stack engineer who ships AI-powered products <text:span text:style-name="T1">end-to-end</text:span> — React/TypeScript interfaces through Python/Node services, real-time data, and cloud deployment. Built and run a multi-tenant strategy-execution platform in production; shipped enterprise features at Fortune-100 scale at Smartsheet and Microsoft.</text:p>
      <text:p text:style-name="Body"/>
      <text:p text:style-name="Section">TECHNICAL SKILLS</text:p>
      <text:p text:style-name="Body"><text:span text:style-name="Bold">Languages: </text:span>TypeScript, JavaScript (ES6+), Python, C#, SQL</text:p>
      <text:p text:style-name="Body"><text:span text:style-name="Bold">Frontend: </text:span>React, Next.js, Redux, TailwindCSS, Shadcn, Material UI, Fluent UI, SASS, CSS-in-JS</text:p>
      <text:p text:style-name="Body"><text:span text:style-name="Bold">Backend / Data: </text:span>Node.js, FastAPI, asyncio, WebSockets, PostgreSQL, Redis, Prisma, ETL/streaming, Docker</text:p>
      <text:p text:style-name="Body"><text:span text:style-name="Bold">Cloud: </text:span>AWS, Azure, GCP, Cloudflare <text:span text:style-name="T2">Workers</text:span>, Vercel, Oracle Cloud (OCI ARM64), Digital Ocean</text:p>
      <text:p text:style-name="Body"><text:span text:style-name="Bold">Testing / Tools: </text:span>Jest, Vitest, Playwright, Cypress, Storybook, Git, Azure DevOps, Stripe, OAuth</text:p>
      <text:p text:style-name="P2"><text:span text:style-name="Bold">AI-assisted development: </text:span>Claude Code, <text:span text:style-name="T3">ChatGPT Codex, </text:span>GitHub Copilot, <text:span text:style-name="T4">Cursor,</text:span> <text:span text:style-name="T3">OpenCode</text:span></text:p>
      <text:p text:style-name="Section">EXPERIENCE</text:p>
      <text:p text:style-name="RoleHead"><text:span text:style-name="Bold"><text:span text:style-name="T5">Founding</text:span></text:span><text:span text:style-name="Bold"> Engineer — LiveTape.ai</text:span> — <text:span text:style-name="Ital">Remote | 09/2023 – Present</text:span></text:p>
      <text:list text:style-name="L1">
        <text:list-item>
          <text:p text:style-name="Bullet">Designed and shipped a multi-tenant <text:span text:style-name="T6">SaaS</text:span> platform end to end solo — React/TypeScript, Python/FastAPI, PostgreSQL with Alembic, Redis pub/sub, JWT auth — via Docker Compose on OCI ARM64 behind Cloudflare.</text:p>
        </text:list-item>
        <text:list-item>
          <text:p text:style-name="Bullet">Architected a lock-free, zero-copy IPC layer (seqlock over a memory-mapped ring buffer) so readers never block writers and shared state needs no mutex or message queue.</text:p>
        </text:list-item>
        <text:list-item>
          <text:p text:style-name="Bullet">Built a multi-tenant async worker evaluating user-defined logic trees against live data at sub-50ms latency — up to 50 concurrent runtimes in one asyncio loop, isolated state, no DB on the hot path.</text:p>
        </text:list-item>
        <text:list-item>
          <text:p text:style-name="Bullet">Delivered live state to the browser via Redis pub/sub WebSocket fan-out, with display publishing throttled independently from business-logic execution</text:p>
        </text:list-item>
      </text:list>
      <text:p text:style-name="RoleHead"><text:span text:style-name="Bold">Technical Lead &amp; Developer — Independent Consulting</text:span> (client under NDA) — <text:span text:style-name="Ital">Remote | 10/2025 – 04/2026</text:span></text:p>
      <text:list text:style-name="L1">
        <text:list-item>
          <text:p text:style-name="Bullet">Led and built a full-stack marketplace end to end on Next.js, TypeScript, Prisma, and PostgreSQL — product listings, search, filters, and reviews.</text:p>
        </text:list-item>
        <text:list-item>
          <text:p text:style-name="P3">Integrated Stripe Checkout, Billing, and Connect for one-time, subscription, invoiced payments <text:span text:style-name="T7">and</text:span> automated seller payouts</text:p>
        </text:list-item>
        <text:list-item>
          <text:p text:style-name="P3">implemented RBAC (Buyer/Seller/Admin) and an admin console for moderation and commissions, with email automation via Mailgun.</text:p>
        </text:list-item>
      </text:list>
      <text:p text:style-name="RoleHead"><text:span text:style-name="Bold">Software Engineer II — Smartsheet</text:span> — <text:span text:style-name="Ital">Remote | 06/2021 – 09/2023</text:span></text:p>
      <text:list text:style-name="L1">
        <text:list-item>
          <text:p text:style-name="Bullet">Built and maintained core features for Smartsheet Control Center, an enterprise product used by 96 of the Fortune 100, on React, TypeScript, Node.js, and Ruby.</text:p>
        </text:list-item>
        <text:list-item>
          <text:p text:style-name="Bullet">Contributed accessible components to the Lodestar design system, cutting UI dev time ~20% across teams; led the i18n initiative supporting 3M+ users globally.</text:p>
        </text:list-item>
      </text:list>
      <text:p text:style-name="RoleHead"><text:span text:style-name="Bold">Software Engineer — Microsoft</text:span> (via Mindtree / Insight Global) — <text:span text:style-name="Ital">Remote | 01/2020 – 05/2021</text:span></text:p>
      <text:list text:style-name="L1">
        <text:list-item>
          <text:p text:style-name="Bullet">Built Power Platform products including <text:span text:style-name="T8">Power VA and </text:span>AI Builder, exposing complex business logic through scalable APIs for external consumption.</text:p>
        </text:list-item>
        <text:list-item>
          <text:p text:style-name="Bullet">Owned frontend architecture modernization and a TypeScript lint migration adopted across multiple teams; achieved WCAG 2.1 compliance for critical admin workflows.</text:p>
        </text:list-item>
      </text:list>
      <text:p text:style-name="RoleHead"><text:span text:style-name="Bold">Solutions Engineer — ConnectWise</text:span> — <text:span text:style-name="Ital">Bothell, WA | 06/2018 – 12/2019</text:span></text:p>
      <text:list text:style-name="L1">
        <text:list-item>
          <text:p text:style-name="Bullet">Built custom web UI and client solutions for a global CPQ SaaS platform (HTML, CSS, JavaScript, C#).</text:p>
        </text:list-item>
      </text:list>
      <text:p text:style-name="Section">EDUCATION &amp; CERTIFICATIONS</text:p>
      <text:p text:style-name="Body"><text:span text:style-name="Bold">B.S., Public Policy</text:span>, University of Arizona · Azure Fundamentals (AZ-900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Carlito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Carlito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28in" style:contextual-spacing="false" fo:line-height="104%"/>
      <style:text-properties style:font-name="Carlito" fo:font-family="Carlito" fo:font-size="10pt"/>
    </style:style>
    <style:style style:name="Name" style:family="paragraph" style:parent-style-name="Standard">
      <style:paragraph-properties fo:margin-top="0in" fo:margin-bottom="0.0138in" style:contextual-spacing="false"/>
      <style:text-properties fo:font-size="19pt" fo:font-weight="bold"/>
    </style:style>
    <style:style style:name="Contact" style:family="paragraph" style:parent-style-name="Standard">
      <style:paragraph-properties fo:margin-top="0in" fo:margin-bottom="0.0598in" style:contextual-spacing="false"/>
      <style:text-properties fo:font-size="9.5pt"/>
    </style:style>
    <style:style style:name="Section" style:family="paragraph" style:parent-style-name="Standard">
      <style:paragraph-properties fo:margin-top="0.0453in" fo:margin-bottom="0.0201in" style:contextual-spacing="false" fo:padding-left="0in" fo:padding-right="0in" fo:padding-top="0in" fo:padding-bottom="0.0138in" fo:border-left="none" fo:border-right="none" fo:border-top="none" fo:border-bottom="0.51pt solid #000000"/>
      <style:text-properties fo:font-size="11pt" fo:letter-spacing="0.0071in" fo:font-weight="bold"/>
    </style:style>
    <style:style style:name="RoleHead" style:family="paragraph" style:parent-style-name="Standard">
      <style:paragraph-properties fo:margin-top="0.0319in" fo:margin-bottom="0.0138in" style:contextual-spacing="false"/>
    </style:style>
    <style:style style:name="Body" style:family="paragraph" style:parent-style-name="Standard">
      <style:paragraph-properties fo:margin-top="0in" fo:margin-bottom="0.028in" style:contextual-spacing="false"/>
    </style:style>
    <style:style style:name="Bullet" style:family="paragraph" style:parent-style-name="Standard" style:list-style-name="L1">
      <style:paragraph-properties fo:margin-left="0.2201in" fo:margin-top="0in" fo:margin-bottom="0.0071in" style:contextual-spacing="false" fo:text-indent="-0.15in" style:auto-text-indent="false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Bold" style:family="text">
      <style:text-properties fo:font-weight="bold"/>
    </style:style>
    <style:style style:name="Ital" style:family="text">
      <style:text-properties fo:font-style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1">
      <text:list-level-style-bullet text:level="1" loext:num-list-format="%1%" text:bullet-char="•">
        <style:list-level-properties text:min-label-width="0.15i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5in" fo:margin-bottom="0.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6-07-15T12:10:40.083575339</dc:date>
    <meta:editing-duration>PT32M25S</meta:editing-duration>
    <meta:editing-cycles>16</meta:editing-cycles>
    <meta:print-date>2026-07-15T11:50:04.468317790</meta:print-date>
    <meta:printed-by>PDF files</meta:printed-by>
    <meta:document-statistic meta:table-count="0" meta:image-count="0" meta:object-count="0" meta:page-count="1" meta:paragraph-count="31" meta:word-count="456" meta:character-count="3305" meta:non-whitespace-character-count="2872"/>
  </office:meta>
</office:document-meta>
</file>